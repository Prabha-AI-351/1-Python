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dd1d"/>
    </style:style>
    <style:style style:name="P2" style:family="paragraph" style:parent-style-name="Standard">
      <style:text-properties officeooo:rsid="0012b6ac" officeooo:paragraph-rsid="0012b6ac"/>
    </style:style>
    <style:style style:name="P3" style:family="paragraph" style:parent-style-name="Standard">
      <style:text-properties officeooo:rsid="0013dd1d" officeooo:paragraph-rsid="0013dd1d"/>
    </style:style>
    <style:style style:name="P4" style:family="paragraph" style:parent-style-name="Standard">
      <style:text-properties officeooo:rsid="0012b6ac" officeooo:paragraph-rsid="0013dd1d"/>
    </style:style>
    <style:style style:name="T1" style:family="text">
      <style:text-properties officeooo:rsid="0013dd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pe Artificial Intelligence<text:line-break/>Scenario Based Learning<text:line-break/>A company works with number of employees, all the works are dependents on the employees. Even<text:line-break/>if one of the employees resign the job immediately then assigned work will be not finished at the<text:line-break/>time, so delivery of the project to the clients will be delayed. Company planned to make solution for<text:line-break/>this, they want to know which employee may resign next. If they know previously, they can arrange<text:line-break/>alternative to avoid such problem. As an AI Engineer you must give Solution to this.<text:line-break/>A) How will you achieve this in AI?<text:line-break/>B) Find out the 3 -Stage of Problem Identification<text:line-break/>C) Name the project<text:line-break/> C) Name the project</text:p>
      <text:p text:style-name="Standard"/>
      <text:p text:style-name="P2">A) How will you achieve this in AI?</text:p>
      <text:p text:style-name="P2"/>
      <text:p text:style-name="P2">Every organisation collects quarterly or monthly feedback <text:s/>or pulse check of the employees(like promotion, oppurtunity, learning,salary hike, work life balance). That list can be cross checked with the Employee who already quit and a seprate database can be made.</text:p>
      <text:p text:style-name="P2">Those data base can be used to train a model and predict if an employee will resign or not.</text:p>
      <text:p text:style-name="P2"/>
      <text:p text:style-name="P2">B) Find out the 3 -Stage of Problem Identification</text:p>
      <text:p text:style-name="P2"/>
      <text:p text:style-name="P2">Stage-1-Domain selection</text:p>
      <text:p text:style-name="P2">INPUT ==TEXT: So Natural language processing (NLP)</text:p>
      <text:p text:style-name="P2">Stage-<text:span text:style-name="T1">2-Type of learning</text:span></text:p>
      <text:p text:style-name="P3">++Requirements clear (input and output is well defined):Supervised learning</text:p>
      <text:p text:style-name="P3">Stage-3-Type of problem:Classification</text:p>
      <text:p text:style-name="P3"/>
      <text:p text:style-name="P3">C) Name the project</text:p>
      <text:p text:style-name="P3">Employee resignation predictor</text:p>
      <text:p text:style-name="P3"/>
      <text:p text:style-name="P3">C) Name the project</text:p>
      <text:p text:style-name="P4">promotion, oppurtunity, learning, salary hike, work life balance –<text:span text:style-name="T1">I/P</text:span></text:p>
      <text:p text:style-name="P3">Employee current status(deployed/resigned)-O/P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1T19:52:58.611887800</meta:creation-date>
    <dc:date>2026-07-21T21:17:24.540681400</dc:date>
    <meta:editing-duration>PT2M41S</meta:editing-duration>
    <meta:editing-cycles>1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15" meta:word-count="237" meta:character-count="1490" meta:non-whitespace-character-count="1266"/>
  </office:meta>
</office:document-meta>
</file>